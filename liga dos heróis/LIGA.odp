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6C089B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_20_A4">
      <style:graphic-properties draw:textarea-horizontal-align="center" draw:textarea-vertical-align="middle" draw:color-mode="standard" draw:luminance="-2%" draw:contrast="0%" draw:gamma="100%" draw:red="3%" draw:green="-12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textarea-horizontal-align="justify" fo:min-height="12.622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fo:min-height="18.537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fo:min-height="20.75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fo:min-height="7.819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fo:min-height="11.728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fo:min-height="12.228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fo:min-height="20.443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fo:min-height="16.562cm" loext:decorative="false"/>
      <style:paragraph-properties style:writing-mode="lr-tb"/>
    </style:style>
    <style:style style:name="pr1" style:family="presentation" style:parent-style-name="Default-title">
      <style:graphic-properties draw:textarea-horizontal-align="center" draw:auto-grow-height="true" fo:min-height="4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d6d" loext:opacity="100%"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justify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/>
      <style:paragraph-properties fo:margin-top="0.42cm" fo:margin-bottom="0.35cm"/>
      <style:text-properties style:font-name="Lato Medium" fo:font-size="24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margin-top="0.42cm" fo:margin-bottom="0.35cm" fo:text-align="justify"/>
      <style:text-properties style:font-name="Lato Medium" fo:font-size="24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margin-top="0.42cm" fo:margin-bottom="0.35cm" fo:text-align="justify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margin-top="0.42cm" fo:margin-bottom="0.35cm"/>
      <style:text-properties style:font-name="Lato Medium" fo:font-size="24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paragraph-properties fo:margin-top="0.42cm" fo:margin-bottom="0.35cm"/>
      <style:text-properties style:font-name="Lato Medium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margin-top="0.42cm" fo:margin-bottom="0.35cm" fo:text-align="justify"/>
      <style:text-properties style:font-name="Lato Medium" fo:font-size="24pt" fo:font-weight="bold" style:font-size-asian="16pt" style:font-weight-asian="bold" style:font-size-complex="16pt" style:font-weight-complex="bold"/>
    </style:style>
    <style:style style:name="P13" style:family="paragraph">
      <loext:graphic-properties draw:fill="none"/>
      <style:paragraph-properties fo:margin-top="0.42cm" fo:margin-bottom="0.35cm"/>
      <style:text-properties fo:font-size="24pt" fo:font-weight="bold" style:font-size-asian="16pt" style:font-weight-asian="bold" style:font-size-complex="16pt" style:font-weight-complex="bold"/>
    </style:style>
    <style:style style:name="T1" style:family="text">
      <style:text-properties fo:color="#ff6d6d" loext:opacity="100%" fo:font-size="40pt" style:font-size-asian="40pt" style:font-size-complex="40pt"/>
    </style:style>
    <style:style style:name="T2" style:family="text">
      <style:text-properties style:font-name="Lato Medium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Lato Medium" fo:font-size="32pt" style:font-size-asian="32pt" style:font-size-complex="32pt"/>
    </style:style>
    <style:style style:name="T4" style:family="text">
      <style:text-properties style:font-name="Lato Medium" fo:font-size="24pt" style:font-size-asian="10pt" style:font-size-complex="10pt"/>
    </style:style>
    <style:style style:name="T5" style:family="text">
      <style:text-properties style:font-name="Lato Medium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ato Medium" fo:font-size="24pt"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ato Medium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Lato Medium" fo:font-size="10pt" style:font-size-asian="10pt" style:font-size-complex="10pt"/>
    </style:style>
    <style:style style:name="T10" style:family="text">
      <style:text-properties style:font-name="Lato Medium" fo:font-size="24pt" fo:font-weight="bold" style:font-size-asian="16pt" style:font-weight-asian="bold" style:font-size-complex="16pt" style:font-weight-complex="bold"/>
    </style:style>
    <style:style style:name="T11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729cm" svg:height="42cm" svg:x="1.471cm" svg:y="-18.39cm" presentation:class="title">
          <draw:text-box>
            <text:p text:style-name="P1"><text:span text:style-name="T1">LIGA DOS DEFENSORES DO FULLSTACK</text:span></text:p>
          </draw:text-box>
        </draw:frame>
        <draw:frame draw:style-name="gr1" draw:text-style-name="P1" draw:layer="layout" svg:width="14.368cm" svg:height="15.76cm" svg:x="6.83cm" svg:y="4.889cm">
          <draw:image xlink:href="Pictures/1000000000000200000002006C089B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6" draw:layer="layout" svg:width="29.5cm" svg:height="12.872cm" svg:x="0cm" svg:y="1.5cm">
          <draw:text-box>
            <text:p text:style-name="P4"><text:span text:style-name="T2">🔹 Prólogo – O Chamado para a Jornada</text:span></text:p>
            <text:p text:style-name="P4"><text:span text:style-name="T3">A profecia do Código Sagrado e o surgimento da Liga</text:span></text:p>
            <text:p text:style-name="P4"><text:span text:style-name="T3">A ameaça do caos digital liderada por Bugor</text:span></text:p>
            <text:p text:style-name="P4"><text:span text:style-name="T3">A missão de restaurar o equilíbrio com Java e Angular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7" draw:layer="layout" svg:width="29.7cm" svg:height="18.787cm" svg:x="0cm" svg:y="0.713cm">
          <draw:text-box>
            <text:p text:style-name="P4"><text:span text:style-name="T2">🔹 Capítulo 1 – Os Primeiros Defensores e os Pilares da Liga</text:span></text:p>
            <text:p text:style-name="P4"><text:span text:style-name="T3">A fundação da Liga: ByteStorm, FrontFlash e CyberShield</text:span></text:p>
            <text:p text:style-name="P4"><text:span text:style-name="T3">Orientação a Objetos em Java – Os quatro pilares sagrados da programação</text:span></text:p>
            <text:p text:style-name="P4"><text:span text:style-name="T3">Encapsulamento (Proteção contra invasores de código)</text:span></text:p>
            <text:p text:style-name="P4"><text:span text:style-name="T3">Herança (Transmitindo poder entre classes)</text:span></text:p>
            <text:p text:style-name="P4"><text:span text:style-name="T3">Polimorfismo (Adaptação estratégica de métodos)</text:span></text:p>
            <text:p text:style-name="P4"><text:span text:style-name="T3">Abstração (Criando códigos limpos e eficientes)</text:span></text:p>
            <text:p text:style-name="P4"><text:span text:style-name="T3">Primeiro desafio: Construir a base da Fortaleza de Código</text:span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9.7cm" svg:height="21cm" svg:x="0cm" svg:y="0cm">
          <draw:text-box>
            <text:p text:style-name="P4"><text:span text:style-name="T2">🔹 Capítulo 2 – A Construção da Fortaleza Fullstack</text:span></text:p>
            <text:p text:style-name="P4"><text:span text:style-name="T4">Configurando o ambiente de guerra: Java e Angular unidos</text:span></text:p>
            <text:p text:style-name="P4"><text:span text:style-name="T4">Criando a API do Defensor do Backend (Spring Boot)</text:span></text:p>
            <text:p text:style-name="P4"><text:span text:style-name="T4">Erguendo a interface do Guardião do Frontend (Angular)</text:span></text:p>
            <text:p text:style-name="P4"><text:span text:style-name="T4">Desafio: Implementar as primeiras classes e componentes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8" draw:layer="layout" svg:width="30cm" svg:height="21cm" svg:x="0cm" svg:y="0cm">
          <draw:text-box>
            <text:p text:style-name="P4"><text:span text:style-name="T2">🔹 Capítulo 3 – A Sombra do Caos e a Guerra Digital</text:span></text:p>
            <text:p text:style-name="P4"><text:span text:style-name="T5"/></text:p>
            <text:p text:style-name="P4"><text:span text:style-name="T6">Bugor ataca com NullPointers, Erros 404 e CSS Corrompido</text:span></text:p>
            <text:p text:style-name="P4"><text:span text:style-name="T6">Estratégias para fortalecer a Liga contra ataques</text:span></text:p>
            <text:p text:style-name="P4"><text:span text:style-name="T6">Aplicação dos princípios da Orientação a Objetos para modularizar o código</text:span></text:p>
            <text:p text:style-name="P4"><text:span text:style-name="T6">Testes como escudos de proteção contra falhas e invasões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6" draw:layer="layout" svg:width="29.7cm" svg:height="8.069cm" svg:x="0cm" svg:y="1.431cm">
          <draw:text-box>
            <text:p text:style-name="P4"><text:span text:style-name="T2">Capítulo 4 – A Ascensão dos Defensores Fullstack</text:span></text:p>
            <text:p text:style-name="P4"><text:span text:style-name="T4">Integração entre Java e Angular: conectando os heróis</text:span></text:p>
            <text:p text:style-name="P4"><text:span text:style-name="T4">Comunicação via REST API e JSON</text:span></text:p>
            <text:p text:style-name="P4"><text:span text:style-name="T4">Segurança e autenticação: fortalecendo o escudo da liga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9" draw:layer="layout" svg:width="29.7cm" svg:height="11.978cm" svg:x="0cm" svg:y="0.5cm">
          <draw:text-box>
            <text:p text:style-name="P4"><text:span text:style-name="T2">Capítulo 5 – O Confronto Final: Desplegando na Web</text:span></text:p>
            <text:p text:style-name="P4"><text:span text:style-name="T6">Preparando a aplicação para produção</text:span></text:p>
            <text:p text:style-name="P4"><text:span text:style-name="T6">Deploy e melhores práticas de manutenção</text:span></text:p>
            <text:p text:style-name="P4"><text:span text:style-name="T6">Como continuar evoluindo e se tornar um verdadeiro mestre do código</text:span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6" draw:layer="layout" svg:width="29.7cm" svg:height="12.478cm" svg:x="0cm" svg:y="0cm">
          <draw:text-box>
            <text:p text:style-name="P4"><text:span text:style-name="T2">Epílogo – O Legado da Liga do Código</text:span></text:p>
            <text:p text:style-name="P4"><text:span text:style-name="T4">Recursos para continuar aprendendo</text:span></text:p>
            <text:p text:style-name="P4"><text:span text:style-name="T4">Como contribuir para a comunidade</text:span></text:p>
            <text:p text:style-name="P4"><text:span text:style-name="T4">O próximo desafio no caminho dos defensores fullstack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10" draw:layer="layout" svg:width="29.993cm" svg:height="21cm" svg:x="-0.106cm" svg:y="0cm">
          <draw:text-box>
            <text:p text:style-name="P4"><text:span text:style-name="T8">🔹 Prólogo – O Chamado para a Jornada</text:span></text:p>
            <text:p text:style-name="P4"><text:span text:style-name="T5"/></text:p>
            <text:p text:style-name="P4"><text:span text:style-name="T6">Em um universo digital assolado pelo Caos do Código, onde servidores falham e sistemas entram em colapso, a paz da programação está ameaçada. O vilão supremo, Bugor, espalha seus exércitos de NullPointers, Erros 404 e códigos desorganizados, levando desenvolvedores ao desespero.</text:span></text:p>
            <text:p text:style-name="P4"><text:span text:style-name="T6">No meio desse caos, surge um jovem programador: Neo Code. Guiado por uma antiga profecia do Código Sagrado, ele descobre que apenas a união perfeita entre Java para Backend e Angular para Frontend poderá restaurar a ordem.</text:span></text:p>
            <text:p text:style-name="P4"><text:span text:style-name="T6">Mas Neo não pode lutar sozinho. Ele parte em busca dos lendários defensores:</text:span></text:p>
            <text:p text:style-name="P4"><text:span text:style-name="T6">ByteStorm, mestre do Java e das APIs</text:span></text:p>
            <text:p text:style-name="P4"><text:span text:style-name="T6">FrontFlash, mago do Angular e criador de interfaces extraordinárias</text:span></text:p>
            <text:p text:style-name="P4"><text:span text:style-name="T6">CyberShield, protetor da segurança e dos testes impenetráveis</text:span></text:p>
            <text:p text:style-name="P4"><text:span text:style-name="T6">Juntos, eles formarão a Liga do Código. Mas antes da batalha final, precisam dominar o conhecimento mais poderoso: a Orientação a Objetos.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10" draw:layer="layout" svg:width="29.117cm" svg:height="21cm" svg:x="0.332cm" svg:y="0cm">
          <draw:text-box>
            <text:p text:style-name="P4"><text:span text:style-name="T8">🔹 Capítulo 1 – Os Primeiros Defensores e os Pilares da Liga</text:span></text:p>
            <text:p text:style-name="P4"><text:span text:style-name="T8"/></text:p>
            <text:p text:style-name="P4"><text:span text:style-name="T4">A Liga se reúne em um antigo servidor abandonado, onde os segredos da programação estruturada estão guardados. Para derrotar Bugor, eles precisam entender os quatro pilares da Orientação a Objetos e usá-los como armas:</text:span></text:p>
            <text:p text:style-name="P4"><text:span text:style-name="T4">🛡 Encapsulamento – O Escudo Sagrado Protege atributos e métodos contra invasões de código malicioso.</text:span></text:p>
            <text:p text:style-name="P4"><text:span text:style-name="T4">⚔ Herança – O Legado dos Mestres Permite que classes compartilhem poderes, reduzindo a repetição de código.</text:span></text:p>
            <text:p text:style-name="P4"><text:span text:style-name="T4">🎭 Polimorfismo – A Arte da Camuflagem Faz com que métodos se adaptem a diferentes necessidades e combates.</text:span></text:p>
            <text:p text:style-name="P4"><text:span text:style-name="T4">🔮 Abstração – O Código Secreto Oculta detalhes internos, tornando o código limpo e eficiente.</text:span></text:p>
            <text:p text:style-name="P4"><text:span text:style-name="T4">Com esse conhecimento, a Liga do Código começa a construir sua fortaleza digital.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9" draw:text-style-name="P11" draw:layer="layout" svg:width="29.7cm" svg:height="20.693cm" svg:x="0cm" svg:y="0.307cm">
          <draw:text-box>
            <text:p text:style-name="P4"><text:span text:style-name="T8">🔹 Capítulo 2 – A Construção da Fortaleza Fullstack</text:span></text:p>
            <text:p text:style-name="P4"><text:span text:style-name="T8"/></text:p>
            <text:p text:style-name="P4"><text:span text:style-name="T6">A Liga inicia a criação da Fortaleza do Código, onde Java e Angular se unem em perfeita harmonia. Cada herói desempenha seu papel:</text:span></text:p>
            <text:p text:style-name="P4"><text:span text:style-name="T6">ByteStorm cria uma API REST robusta com Spring Boot, garantindo que os dados sejam organizados e protegidos.</text:span></text:p>
            <text:p text:style-name="P4"><text:span text:style-name="T6">FrontFlash desenvolve um frontend dinâmico com Angular, permitindo interações fluidas e responsivas.</text:span></text:p>
            <text:p text:style-name="P4"><text:span text:style-name="T6">CyberShield implementa testes e autenticação, protegendo o sistema contra invasões.</text:span></text:p>
            <text:p text:style-name="P4"><text:span text:style-name="T6">O treinamento avança, mas um ataque inesperado acontece: Bugor lança um vírus digital devastador, corrompendo os servidores.</text:span></text:p>
            <text:p text:style-name="P5"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0" draw:text-style-name="P10" draw:layer="layout" svg:width="29.7cm" svg:height="16.812cm" svg:x="0cm" svg:y="1.5cm">
          <draw:text-box>
            <text:p text:style-name="P4"><text:span text:style-name="T8">🔹 Capítulo 3 – A Sombra do Caos e a Guerra Digital</text:span></text:p>
            <text:p text:style-name="P4"><text:span text:style-name="T8"/></text:p>
            <text:p text:style-name="P4"><text:span text:style-name="T4">Bugor invade os sistemas com um ataque de NullPointers, Erros 404 e CSS Corrompido, ameaçando destruir toda a estrutura construída pela Liga.</text:span></text:p>
            <text:p text:style-name="P4"><text:span text:style-name="T4">A batalha começa:</text:span></text:p>
            <text:p text:style-name="P4"><text:span text:style-name="T4">ByteStorm usa seu conhecimento de Encapsulamento para proteger os métodos críticos.</text:span></text:p>
            <text:p text:style-name="P4"><text:span text:style-name="T4">FrontFlash aplica Polimorfismo para adaptar funções do frontend à interface de guerra.</text:span></text:p>
            <text:p text:style-name="P4"><text:span text:style-name="T4">CyberShield reforça a segurança com Herança, criando defesas escaláveis contra ataques.</text:span></text:p>
            <text:p text:style-name="P4"><text:span text:style-name="T4">A guerra digital se intensifica. No meio do caos, Neo Code descobre um segredo: o verdadeiro poder da Orientação a Objetos está na integração entre Backend e Frontend.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10" draw:layer="layout" svg:width="29.566cm" svg:height="21cm" svg:x="0.107cm" svg:y="0cm">
          <draw:text-box>
            <text:p text:style-name="P4"><text:span text:style-name="T8">🔹 Capítulo 4 – A Ascensão dos Defensores Fullstack</text:span></text:p>
            <text:p text:style-name="P4"><text:span text:style-name="T8"/></text:p>
            <text:p text:style-name="P4"><text:span text:style-name="T4">A Liga do Código domina completamente a conexão entre Java e Angular. Agora, eles podem se comunicar em tempo real, eliminando as falhas e fortalecendo a arquitetura da aplicação.</text:span></text:p>
            <text:p text:style-name="P4"><text:span text:style-name="T4">🛡 REST API e JSON – O Elo Supremo Os sistemas agora fluem sem erros, conectando Backend e Frontend com precisão.</text:span></text:p>
            <text:p text:style-name="P4"><text:span text:style-name="T4">🔥 Autenticação e Segurança – A Armadura Final CyberShield implementa uma camada de proteção impenetrável.</text:span></text:p>
            <text:p text:style-name="P4"><text:span text:style-name="T4">🚀 Arquitetura Escalável – O Código Definitivo ByteStorm e FrontFlash garantem que o sistema seja modular e robusto.</text:span></text:p>
            <text:p text:style-name="P4"><text:span text:style-name="T4">Bugor começa a enfraquecer. O vilão percebe que sua estratégia de caos está ruindo. Mas ele ainda tem uma última carta na manga…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" draw:text-style-name="P12" draw:layer="layout" svg:width="29.7cm" svg:height="21cm" svg:x="0cm" svg:y="0cm">
          <draw:text-box>
            <text:p text:style-name="P4"><text:span text:style-name="T10">🔹 Capítulo 5 – O Confronto Final: Desplegando na Web</text:span></text:p>
            <text:p text:style-name="P4"><text:span text:style-name="T10"/></text:p>
            <text:p text:style-name="P4"><text:span text:style-name="T4">Bugor lança seu ataque final, tentando destruir o código da Liga com um vírus fatal. Mas agora, os defensores estão preparados!</text:span></text:p>
            <text:p text:style-name="P4"><text:span text:style-name="T4">🔥 A API responde instantaneamente ao Frontend 🔥 Os testes reforçam a estrutura contra falhas 🔥 A segurança bloqueia qualquer tentativa de invasão</text:span></text:p>
            <text:p text:style-name="P4"><text:span text:style-name="T4">Com um último comando no terminal, a Liga dispara um feixe de luz digital, erradicando os bugs e restaurando o equilíbrio da programação.</text:span></text:p>
            <text:p text:style-name="P4"><text:span text:style-name="T4">Bugor é derrotado. O caos foi vencido. Mas a jornada está longe de acabar…</text:span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" draw:text-style-name="P12" draw:layer="layout" svg:width="29.996cm" svg:height="21cm" svg:x="-0.108cm" svg:y="0cm">
          <draw:text-box>
            <text:p text:style-name="P4"><text:span text:style-name="T8">🔹 Epílogo – O Legado da Liga do Código</text:span></text:p>
            <text:p text:style-name="P4"><text:span text:style-name="T8"/></text:p>
            <text:p text:style-name="P4"><text:span text:style-name="T4">A paz reina no mundo digital. A Liga do Código agora treina novos programadores para se tornarem Defensores Fullstack, garantindo que a programação continue evoluindo e segura contra futuras ameaças.</text:span></text:p>
            <text:p text:style-name="P4"><text:span text:style-name="T4">Mas um último mistério permanece: Uma sombra se forma nos recantos do código legado… Um novo vilão está prestes a surgir. A Liga do Código precisará estar preparada para o próximo desafio!</text:span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" draw:text-style-name="P10" draw:layer="layout" svg:width="29.232cm" svg:height="21cm" svg:x="0.274cm" svg:y="0cm">
          <draw:text-box>
            <text:p text:style-name="P4"><text:span text:style-name="T5">Autor</text:span></text:p>
            <text:p text:style-name="P4"><text:span text:style-name="T6">[Carlos] – Um defensor incansável do código e mentor da próxima geração de programadores fullstack. Com vasta experiência em desenvolvimento backend e frontend, ele(a) acredita que a verdadeira força de um programador está na sua capacidade de aprender, adaptar-se e criar soluções inovadoras para o mundo digital.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5" draw:text-style-name="P13" draw:layer="layout" svg:width="29.978cm" svg:height="21cm" svg:x="-0.099cm" svg:y="0cm">
          <draw:text-box>
            <text:p text:style-name="P4"><text:span text:style-name="T8">Finalidade do eBook</text:span></text:p>
            <text:p text:style-name="P4"><text:span text:style-name="T8"/></text:p>
            <text:p text:style-name="P4"><text:span text:style-name="T4">Este eBook foi criado para ser um guia épico para desenvolvedores que desejam se tornar Defensores Fullstack, dominando Java para Backend e Angular para Frontend de maneira integrada e eficiente. Através de uma narrativa envolvente, conceitos técnicos essenciais são apresentados como desafios e batalhas, tornando o aprendizado mais divertido e imersivo.</text:span></text:p>
            <text:p text:style-name="P4"><text:span text:style-name="T4">Objetivos: ✅ Ensinar os pilares da Orientação a Objetos no desenvolvimento backend com Java ✅ Mostrar como Angular pode ser utilizado para criar interfaces poderosas ✅ Demonstrar a importância da comunicação entre Backend e Frontend ✅ Fortalecer conhecimentos sobre segurança, testes e boas práticas ✅ Inspirar programadores a enfrentarem os desafios do mundo da tecnologia</text:span></text:p>
            <text:p text:style-name="P4"><text:span text:style-name="T4">Este livro é mais do que um manual técnico. É um convite para fazer parte da Liga do Código, uma comunidade de programadores que buscam crescer, compartilhar conhecimento e criar sistemas que transformarão o futuro da tecnologia.</text:span></text:p>
            <text:p text:style-name="P4"><text:span text:style-name="T4"/></text:p>
            <text:p text:style-name="P5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4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09cm" fo:margin-bottom="0cm" fo:text-indent="0cm"/>
      <style:text-properties fo:font-size="36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4cm" fo:margin-bottom="0cm" fo:text-indent="0cm"/>
      <style:text-properties fo:font-size="31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5cm" fo:margin-bottom="0cm" fo:text-indent="0cm"/>
      <style:text-properties fo:font-size="2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5cm" fo:margin-bottom="0cm" fo:text-indent="0cm"/>
      <style:text-properties fo:font-size="2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5cm" fo:margin-bottom="0cm" fo:text-indent="0cm"/>
      <style:text-properties fo:font-size="2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5cm" fo:margin-bottom="0cm" fo:text-indent="0cm"/>
      <style:text-properties fo:font-size="2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5cm" fo:margin-bottom="0cm" fo:text-indent="0cm"/>
      <style:text-properties fo:font-size="2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5cm" fo:margin-bottom="0cm" fo:text-indent="0cm"/>
      <style:text-properties fo:font-size="2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9cm" svg:height="3.506cm" svg:x="1.471cm" svg:y="0.821cm" presentation:class="title" presentation:placeholder="true">
        <draw:text-box/>
      </draw:frame>
      <draw:frame presentation:style-name="Default-outline1" draw:layer="backgroundobjects" svg:width="26.729cm" svg:height="12.179cm" svg:x="1.471cm" svg:y="4.897cm" presentation:class="outline" presentation:placeholder="true">
        <draw:text-box/>
      </draw:frame>
      <draw:frame presentation:style-name="Mpr1" draw:text-style-name="MP2" draw:layer="backgroundobjects" svg:width="6.917cm" svg:height="1.444cm" svg:x="1.471cm" svg:y="1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4cm" svg:x="10.141cm" svg:y="19.1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7cm" svg:height="1.444cm" svg:x="21.277cm" svg:y="19.1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5:32:37.273774272</meta:creation-date>
    <dc:date>2025-06-07T12:35:40.854219928</dc:date>
    <meta:editing-duration>PT8H35M15S</meta:editing-duration>
    <meta:editing-cycles>39</meta:editing-cycles>
    <meta:generator>LibreOffice/25.2.3.2$Linux_X86_64 LibreOffice_project/520$Build-2</meta:generator>
    <meta:document-statistic meta:object-count="73"/>
  </office:meta>
</office:document-meta>
</file>